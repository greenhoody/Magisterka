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31d" officeooo:paragraph-rsid="0015731d"/>
    </style:style>
    <style:style style:name="P2" style:family="paragraph" style:parent-style-name="Standard" style:list-style-name="L1">
      <style:text-properties officeooo:rsid="0015731d" officeooo:paragraph-rsid="0015731d"/>
    </style:style>
    <style:style style:name="P3" style:family="paragraph" style:parent-style-name="Text_20_body">
      <style:text-properties officeooo:rsid="0015731d" officeooo:paragraph-rsid="0015731d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anowienia:</text:p>
      <text:list text:style-name="L1">
        <text:list-item>
          <text:p text:style-name="P2">Ograniczenia:</text:p>
          <text:list>
            <text:list-item>
              <text:p text:style-name="P2">Stałe drużyny według standardowego configu human z blood bowl</text:p>
            </text:list-item>
            <text:list-item>
              <text:p text:style-name="P2">Zawsze takie same rozstawienie, drużyny atakującej i broniącej. Mają różne. </text:p>
            </text:list-item>
            <text:list-item>
              <text:p text:style-name="P2">Najpierw tworze bota atakującego. Tego co odbiera z kickoffa</text:p>
            </text:list-item>
            <text:list-item>
              <text:p text:style-name="P2"/>
            </text:list-item>
          </text:list>
        </text:list-item>
      </text:list>
      <text:p text:style-name="P1"/>
      <text:p text:style-name="P1">Boisko:</text:p>
      <text:p text:style-name="P1"/>
      <text:p text:style-name="P1">Możliwe akcje:</text:p>
      <text:p text:style-name="P1"/>
      <text:p text:style-name="P1">Zasady Gry:</text:p>
      <text:p text:style-name="P1">1. Gra trfa 32 tury</text:p>
      <text:p text:style-name="P1">2. 2 połowy po 8 tur dla każdej drużyny</text:p>
      <text:p text:style-name="P1">3. Drużyna może być broniąca albo atakująca.</text:p>
      <text:p text:style-name="P1"/>
      <text:p text:style-name="P1"/>
      <text:p text:style-name="P1"/>
      <text:p text:style-name="P3">Default simple action types:</text:p>
      <text:list text:style-name="L2">
        <text:list-item>
          <text:p text:style-name="P4">START_GAME, </text:p>
        </text:list-item>
        <text:list-item>
          <text:p text:style-name="P4">HEADS, </text:p>
        </text:list-item>
        <text:list-item>
          <text:p text:style-name="P4">TAILS, </text:p>
        </text:list-item>
        <text:list-item>
          <text:p text:style-name="P4">KICK, </text:p>
        </text:list-item>
        <text:list-item>
          <text:p text:style-name="P4">RECEIVE, </text:p>
        </text:list-item>
        <text:list-item>
          <text:p text:style-name="P4">END_SETUP, </text:p>
        </text:list-item>
        <text:list-item>
          <text:p text:style-name="P4">END_PLAYER_TURN, </text:p>
        </text:list-item>
        <text:list-item>
          <text:p text:style-name="P4">USE_REROLL, </text:p>
        </text:list-item>
        <text:list-item>
          <text:p text:style-name="P4">DONT_USE_REROLL, </text:p>
        </text:list-item>
        <text:list-item>
          <text:p text:style-name="P4">USE_SKILL, </text:p>
        </text:list-item>
        <text:list-item>
          <text:p text:style-name="P4">DONT_USE_SKILL, </text:p>
        </text:list-item>
        <text:list-item>
          <text:p text:style-name="P4">END_TURN, </text:p>
        </text:list-item>
        <text:list-item>
          <text:p text:style-name="P4">STAND_UP, </text:p>
        </text:list-item>
        <text:list-item>
          <text:p text:style-name="P4">SELECT_ATTACKER_DOWN, </text:p>
        </text:list-item>
        <text:list-item>
          <text:p text:style-name="P4">SELECT_BOTH_DOWN, </text:p>
        </text:list-item>
        <text:list-item>
          <text:p text:style-name="P4">SELECT_PUSH, </text:p>
        </text:list-item>
        <text:list-item>
          <text:p text:style-name="P4">SELECT_DEFENDER_STUMBLES, </text:p>
        </text:list-item>
        <text:list-item>
          <text:p text:style-name="P4">SELECT_DEFENDER_DOWN, </text:p>
        </text:list-item>
        <text:list-item>
          <text:p text:style-name="P4">SELECT_NONE, </text:p>
        </text:list-item>
        <text:list-item>
          <text:p text:style-name="P4">USE_BRIBE, </text:p>
        </text:list-item>
        <text:list-item>
          <text:p text:style-name="P5">DONT_USE_BRIBE, </text:p>
        </text:list-item>
      </text:list>
      <text:p text:style-name="Text_20_body">Default positional action types:</text:p>
      <text:list text:style-name="L3">
        <text:list-item>
          <text:p text:style-name="P6">PLACE_BALL, </text:p>
        </text:list-item>
        <text:list-item>
          <text:p text:style-name="P6">PUSH, </text:p>
        </text:list-item>
        <text:list-item>
          <text:p text:style-name="P6">FOLLOW_UP, </text:p>
        </text:list-item>
        <text:list-item>
          <text:p text:style-name="P6">MOVE, </text:p>
        </text:list-item>
        <text:list-item>
          <text:p text:style-name="P6">BLOCK, </text:p>
        </text:list-item>
        <text:list-item>
          <text:p text:style-name="P6">PASS, </text:p>
        </text:list-item>
        <text:list-item>
          <text:p text:style-name="P6"><text:soft-page-break/>FOUL, </text:p>
        </text:list-item>
        <text:list-item>
          <text:p text:style-name="P6">HANDOFF, </text:p>
        </text:list-item>
        <text:list-item>
          <text:p text:style-name="P6">LEAP, </text:p>
        </text:list-item>
        <text:list-item>
          <text:p text:style-name="P6">STAB, </text:p>
        </text:list-item>
        <text:list-item>
          <text:p text:style-name="P6">SELECT_PLAYER, </text:p>
        </text:list-item>
        <text:list-item>
          <text:p text:style-name="P6">START_MOVE, </text:p>
        </text:list-item>
        <text:list-item>
          <text:p text:style-name="P6">START_BLOCK, </text:p>
        </text:list-item>
        <text:list-item>
          <text:p text:style-name="P6">START_BLITZ, </text:p>
        </text:list-item>
        <text:list-item>
          <text:p text:style-name="P6">START_PASS, </text:p>
        </text:list-item>
        <text:list-item>
          <text:p text:style-name="P6">START_FOUL, </text:p>
        </text:list-item>
        <text:list-item>
          <text:p text:style-name="P7">START_HANDOFF 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21:42:07.977414919</meta:creation-date>
    <dc:date>2025-05-17T21:57:45.507064521</dc:date>
    <meta:editing-duration>PT5M19S</meta:editing-duration>
    <meta:editing-cycles>1</meta:editing-cycles>
    <meta:document-statistic meta:table-count="0" meta:image-count="0" meta:object-count="0" meta:page-count="2" meta:paragraph-count="52" meta:word-count="145" meta:character-count="975" meta:non-whitespace-character-count="885"/>
    <meta:generator>LibreOffice/24.8.6.2$Linux_X86_64 LibreOffice_project/480$Build-2</meta:generator>
  </office:meta>
</office:document-meta>
</file>