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56d5d" officeooo:paragraph-rsid="00256d5d"/>
    </style:style>
    <style:style style:name="P2" style:family="paragraph" style:parent-style-name="Standard">
      <style:text-properties officeooo:rsid="001c4a30" officeooo:paragraph-rsid="001c4a30"/>
    </style:style>
    <style:style style:name="P3" style:family="paragraph" style:parent-style-name="Standard">
      <style:text-properties officeooo:rsid="00217b10" officeooo:paragraph-rsid="00217b10"/>
    </style:style>
    <style:style style:name="P4" style:family="paragraph" style:parent-style-name="Standard">
      <style:text-properties officeooo:rsid="001d6900" officeooo:paragraph-rsid="001d6900"/>
    </style:style>
    <style:style style:name="P5" style:family="paragraph" style:parent-style-name="Standard">
      <style:text-properties officeooo:rsid="001eab80" officeooo:paragraph-rsid="001eab80"/>
    </style:style>
    <style:style style:name="P6" style:family="paragraph" style:parent-style-name="Standard">
      <style:text-properties officeooo:rsid="00240009" officeooo:paragraph-rsid="00240009"/>
    </style:style>
    <style:style style:name="P7" style:family="paragraph" style:parent-style-name="Standard">
      <style:text-properties officeooo:rsid="0015731d" officeooo:paragraph-rsid="0015731d"/>
    </style:style>
    <style:style style:name="P8" style:family="paragraph" style:parent-style-name="Standard" style:list-style-name="L1">
      <style:text-properties officeooo:rsid="0015731d" officeooo:paragraph-rsid="0015731d"/>
    </style:style>
    <style:style style:name="P9" style:family="paragraph" style:parent-style-name="Standard" style:list-style-name="L1">
      <style:text-properties officeooo:rsid="00198af4" officeooo:paragraph-rsid="00198af4"/>
    </style:style>
    <style:style style:name="P10" style:family="paragraph" style:parent-style-name="Standard">
      <style:text-properties officeooo:rsid="0015731d" officeooo:paragraph-rsid="0017ce96"/>
    </style:style>
    <style:style style:name="P11" style:family="paragraph" style:parent-style-name="Text_20_body">
      <style:text-properties officeooo:rsid="0015731d" officeooo:paragraph-rsid="0015731d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Standard">
      <style:text-properties officeooo:rsid="00259b8c" officeooo:paragraph-rsid="00259b8c"/>
    </style:style>
    <style:style style:name="P17" style:family="paragraph" style:parent-style-name="Heading_20_4">
      <style:text-properties officeooo:rsid="00259b8c" officeooo:paragraph-rsid="00259b8c"/>
    </style:style>
    <style:style style:name="P18" style:family="paragraph" style:parent-style-name="Text_20_body">
      <style:text-properties officeooo:rsid="00259b8c" officeooo:paragraph-rsid="00259b8c"/>
    </style:style>
    <style:style style:name="P19" style:family="paragraph" style:parent-style-name="Text_20_body">
      <style:text-properties officeooo:paragraph-rsid="00259b8c"/>
    </style:style>
    <style:style style:name="P20" style:family="paragraph" style:parent-style-name="Text_20_body">
      <style:text-properties officeooo:rsid="00278c84" officeooo:paragraph-rsid="00278c84"/>
    </style:style>
    <style:style style:name="T1" style:family="text">
      <style:text-properties officeooo:rsid="0022cda5"/>
    </style:style>
    <style:style style:name="T2" style:family="text">
      <style:text-properties officeooo:rsid="00255d7d"/>
    </style:style>
    <style:style style:name="T3" style:family="text">
      <style:text-properties officeooo:rsid="00259b8c"/>
    </style:style>
    <style:style style:name="T4" style:family="text">
      <style:text-properties style:font-name="Liberation Mono"/>
    </style:style>
    <style:style style:name="T5" style:family="text">
      <style:text-properties style:font-name="Liberation Seri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la proptotypu a2c_agent spokiowałem jako old w botbowl/examples/a2c/ a orginał przerobiłem</text:p>
      <text:p text:style-name="P1"/>
      <text:p text:style-name="P1">Mój bot jest w botbowl/examples/a2c/ a2c_agent.py</text:p>
      <text:p text:style-name="P1"/>
      <text:p text:style-name="P2">INCEPTION CNN</text:p>
      <text:p text:style-name="P3">R<text:span text:style-name="T1">ESNET</text:span></text:p>
      <text:p text:style-name="P4">OPEN AI GYM</text:p>
      <text:p text:style-name="P5">A2C</text:p>
      <text:p text:style-name="P5"/>
      <text:p text:style-name="P6"><text:s/></text:p>
      <text:p text:style-name="P6">W a2c_agent.py klasa CNNPolicy jest siecią neuronową.</text:p>
      <text:p text:style-name="P5"/>
      <text:p text:style-name="P6">w a2c_example.py <text:span text:style-name="T2">tworzenie modelu</text:span></text:p>
      <text:p text:style-name="P6"/>
      <text:p text:style-name="P6">ac_agent = CNNPolicy(spatial_obs_space,</text:p>
      <text:p text:style-name="P6"><text:tab/><text:tab/><text:tab/> <text:s text:c="2"/>non_spatian+obs_space,</text:p>
      <text:p text:style-name="P6"><text:tab/><text:tab/><text:tab/> <text:s text:c="2"/>hidden_nodes=num_hidden_nodes,</text:p>
      <text:p text:style-name="P6"><text:tab/><text:tab/><text:tab/> <text:s text:c="2"/>kernels=num_cnn_kernels,</text:p>
      <text:p text:style-name="P6"><text:tab/><text:tab/><text:tab/> <text:s text:c="2"/>actions=action_space)</text:p>
      <text:p text:style-name="P5"/>
      <text:p text:style-name="P7"/>
      <text:p text:style-name="P7">Postanowienia:</text:p>
      <text:list text:style-name="L1">
        <text:list-item>
          <text:p text:style-name="P8">Ograniczenia:</text:p>
          <text:list>
            <text:list-item>
              <text:p text:style-name="P8">Stałe drużyny według standardowego configu human z blood bowl</text:p>
            </text:list-item>
            <text:list-item>
              <text:p text:style-name="P8">Zawsze takie same rozstawienie, drużyny atakującej i broniącej. Mają różne. </text:p>
            </text:list-item>
            <text:list-item>
              <text:p text:style-name="P8">Najpierw tworze bota atakującego. Tego co odbiera z kickoffa</text:p>
            </text:list-item>
            <text:list-item>
              <text:p text:style-name="P9">Zaczne od wersji 3 graczy </text:p>
            </text:list-item>
          </text:list>
        </text:list-item>
      </text:list>
      <text:p text:style-name="P7"/>
      <text:p text:style-name="P7">Boisko:</text:p>
      <text:p text:style-name="P7"/>
      <text:p text:style-name="P7">Zasady Gry:</text:p>
      <text:p text:style-name="P7">1. Gra trfa 32 tury</text:p>
      <text:p text:style-name="P7">2. 2 połowy po 8 tur dla każdej drużyny</text:p>
      <text:p text:style-name="P7">3. Drużyna może być broniąca albo atakująca.</text:p>
      <text:p text:style-name="P7"/>
      <text:p text:style-name="P7"/>
      <text:p text:style-name="P10">Możliwe akcje:</text:p>
      <text:p text:style-name="P7"/>
      <text:p text:style-name="P11">Default simple action types:</text:p>
      <text:list text:style-name="L2">
        <text:list-item>
          <text:p text:style-name="P12">START_GAME, </text:p>
        </text:list-item>
        <text:list-item>
          <text:p text:style-name="P12">HEADS, </text:p>
        </text:list-item>
        <text:list-item>
          <text:p text:style-name="P12">TAILS, </text:p>
        </text:list-item>
        <text:list-item>
          <text:p text:style-name="P12">KICK, </text:p>
        </text:list-item>
        <text:list-item>
          <text:p text:style-name="P12">RECEIVE, </text:p>
        </text:list-item>
        <text:list-item>
          <text:p text:style-name="P12">END_SETUP, </text:p>
        </text:list-item>
        <text:list-item>
          <text:p text:style-name="P12">END_PLAYER_TURN, </text:p>
        </text:list-item>
        <text:list-item>
          <text:p text:style-name="P12">USE_REROLL, </text:p>
        </text:list-item>
        <text:list-item>
          <text:p text:style-name="P12">DONT_USE_REROLL, </text:p>
        </text:list-item>
        <text:list-item>
          <text:p text:style-name="P12">USE_SKILL, </text:p>
        </text:list-item>
        <text:list-item>
          <text:p text:style-name="P12">DONT_USE_SKILL, </text:p>
        </text:list-item>
        <text:list-item>
          <text:p text:style-name="P12"><text:soft-page-break/>END_TURN, </text:p>
        </text:list-item>
        <text:list-item>
          <text:p text:style-name="P12">STAND_UP, </text:p>
        </text:list-item>
        <text:list-item>
          <text:p text:style-name="P12">SELECT_ATTACKER_DOWN, </text:p>
        </text:list-item>
        <text:list-item>
          <text:p text:style-name="P12">SELECT_BOTH_DOWN, </text:p>
        </text:list-item>
        <text:list-item>
          <text:p text:style-name="P12">SELECT_PUSH, </text:p>
        </text:list-item>
        <text:list-item>
          <text:p text:style-name="P12">SELECT_DEFENDER_STUMBLES, </text:p>
        </text:list-item>
        <text:list-item>
          <text:p text:style-name="P12">SELECT_DEFENDER_DOWN, </text:p>
        </text:list-item>
        <text:list-item>
          <text:p text:style-name="P12">SELECT_NONE, </text:p>
        </text:list-item>
        <text:list-item>
          <text:p text:style-name="P12">USE_BRIBE, </text:p>
        </text:list-item>
        <text:list-item>
          <text:p text:style-name="P13">DONT_USE_BRIBE, </text:p>
        </text:list-item>
      </text:list>
      <text:p text:style-name="Text_20_body">Default positional action types:</text:p>
      <text:list text:style-name="L3">
        <text:list-item>
          <text:p text:style-name="P14">PLACE_BALL, </text:p>
        </text:list-item>
        <text:list-item>
          <text:p text:style-name="P14">PUSH, </text:p>
        </text:list-item>
        <text:list-item>
          <text:p text:style-name="P14">FOLLOW_UP, </text:p>
        </text:list-item>
        <text:list-item>
          <text:p text:style-name="P14">MOVE, </text:p>
        </text:list-item>
        <text:list-item>
          <text:p text:style-name="P14">BLOCK, </text:p>
        </text:list-item>
        <text:list-item>
          <text:p text:style-name="P14">PASS, </text:p>
        </text:list-item>
        <text:list-item>
          <text:p text:style-name="P14">FOUL, </text:p>
        </text:list-item>
        <text:list-item>
          <text:p text:style-name="P14">HANDOFF, </text:p>
        </text:list-item>
        <text:list-item>
          <text:p text:style-name="P14">LEAP, </text:p>
        </text:list-item>
        <text:list-item>
          <text:p text:style-name="P14">STAB, </text:p>
        </text:list-item>
        <text:list-item>
          <text:p text:style-name="P14">SELECT_PLAYER, </text:p>
        </text:list-item>
        <text:list-item>
          <text:p text:style-name="P14">START_MOVE, </text:p>
        </text:list-item>
        <text:list-item>
          <text:p text:style-name="P14">START_BLOCK, </text:p>
        </text:list-item>
        <text:list-item>
          <text:p text:style-name="P14">START_BLITZ, </text:p>
        </text:list-item>
        <text:list-item>
          <text:p text:style-name="P14">START_PASS, </text:p>
        </text:list-item>
        <text:list-item>
          <text:p text:style-name="P14">START_FOUL, </text:p>
        </text:list-item>
        <text:list-item>
          <text:p text:style-name="P15">START_HANDOFF </text:p>
        </text:list-item>
      </text:list>
      <text:p text:style-name="P16"/>
      <text:p text:style-name="P16"/>
      <text:p text:style-name="P7"/>
      <text:h text:style-name="P17" text:outline-level="4">OpenAI gym Environment (ENV.PY)</text:h>
      <text:p text:style-name="P18">Przykład w exemaples/gym_example.py</text:p>
      <text:p text:style-name="P19"><text:span text:style-name="T3">Przykład wielu instalncji w </text:span>examples/multi_gym_example.py</text:p>
      <text:p text:style-name="P18">Botbowl ma zaimplementowny interface OpenAIGym, aby łatwo móc integrować algorytmy uczenia wzmocnionego (reinformcment learning).</text:p>
      <text:p text:style-name="P18">KLASA <text:span text:style-name="T4">BotBowlEnv</text:span></text:p>
      <text:p text:style-name="P20">Po każdym kroku środowisko wysyła do agenta stan gry oraz skalarną wartość nagrody. </text:p>
      <text:p text:style-name="P20"><text:span text:style-name="Source_20_Text"><text:span text:style-name="T4">BotBowlEnv() </text:span></text:span><text:span text:style-name="Source_20_Text"><text:span text:style-name="T5">tworzy grę pomiędzy dwiema drużynami ludzi</text:span></text:span></text:p>
      <text:p text:style-name="P20"><text:span text:style-name="Source_20_Text"><text:span text:style-name="T5">Steruje się drużyną za pomocą </text:span></text:span><text:span text:style-name="Source_20_Text"><text:span text:style-name="T4">step()</text:span></text:span><text:span text:style-name="Source_20_Text"><text:span text:style-name="T5"> .</text:span></text:span></text:p>
      <text:p text:style-name="P20"><text:span text:style-name="Source_20_Text"><text:span text:style-name="T5">W przykładzie jedną drużyną steruje agent drugą randombot.</text:span></text:span></text:p>
      <text:p text:style-name="P20"><text:soft-page-break/><text:span text:style-name="Source_20_Text"><text:span text:style-name="T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21:42:07.977414919</meta:creation-date>
    <dc:date>2025-05-22T23:17:18.336294338</dc:date>
    <meta:editing-duration>PT8H31M59S</meta:editing-duration>
    <meta:editing-cycles>15</meta:editing-cycles>
    <meta:generator>LibreOffice/24.8.6.2$Linux_X86_64 LibreOffice_project/480$Build-2</meta:generator>
    <meta:document-statistic meta:table-count="0" meta:image-count="0" meta:object-count="0" meta:page-count="3" meta:paragraph-count="75" meta:word-count="255" meta:character-count="1924" meta:non-whitespace-character-count="1720"/>
  </office:meta>
</office:document-meta>
</file>